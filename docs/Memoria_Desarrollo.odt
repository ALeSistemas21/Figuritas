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# Memoria de Desarrollo - FiguMatch</text:p>
      <text:p text:style-name="Preformatted_20_Text"/>
      <text:p text:style-name="Preformatted_20_Text">## 1. Definición del Problema</text:p>
      <text:p text:style-name="Preformatted_20_Text">El intercambio de figuritas (cromos o estampas) coleccionables, especialmente durante grandes eventos como mundiales de fútbol, es una actividad tradicionalmente caótica. Los coleccionistas dependen de listas en papel, grupos de WhatsApp desorganizados, o reuniones presenciales a ciegas. **FiguMatch** nace para solucionar la dificultad de encontrar a la persona exacta que tiene la figurita que te falta y que, a su vez, necesita las repetidas que tú tienes. </text:p>
      <text:p text:style-name="Preformatted_20_Text"/>
      <text:p text:style-name="Preformatted_20_Text">El destinatario principal son niños, jóvenes y adultos coleccionistas que buscan optimizar su tiempo, llevar un control estricto de su inventario sin usar papel, y organizar intercambios de manera segura dentro de sus círculos sociales (escuela, trabajo, amigos).</text:p>
      <text:p text:style-name="Preformatted_20_Text"/>
      <text:p text:style-name="Preformatted_20_Text">## 2. Solución Propuesta (La Aplicación)</text:p>
      <text:p text:style-name="Preformatted_20_Text">Se desarrolló una aplicación web progresiva y "Mobile-First" llamada **FiguMatch**. La solución permite a los usuarios:</text:p>
      <text:p text:style-name="Preformatted_20_Text">- Llevar un inventario digital e interactivo del álbum (marcadas como "Obtenidas", "Repetidas" o "Faltantes").</text:p>
      <text:p text:style-name="Preformatted_20_Text">- Construir una "Red de Coleccionistas" mediante códigos de amistad de 6 cifras.</text:p>
      <text:p text:style-name="Preformatted_20_Text">- Utilizar un algoritmo de matching que cruza automáticamente los inventarios de los amigos para mostrar porcentajes de compatibilidad.</text:p>
      <text:p text:style-name="Preformatted_20_Text">- Proponer, aceptar o rechazar intercambios específicos desde un "Centro de Intercambios" (Mis Tratos).</text:p>
      <text:p text:style-name="Preformatted_20_Text"/>
      <text:p text:style-name="Preformatted_20_Text">## 3. Decisiones Técnicas Principales</text:p>
      <text:p text:style-name="Preformatted_20_Text">- **Metodología (Spec-Driven Development):** El desarrollo estuvo guiado por especificaciones (utilizando herramientas como OpenSpec), lo cual permitió definir con antelación el comportamiento esperado y garantizar que la aplicación se ajustara siempre a los requisitos y flujos diseñados previamente, acelerando el ciclo de desarrollo junto a la IA.</text:p>
      <text:p text:style-name="Preformatted_20_Text">- **Framework Frontend (Next.js 14):** Se eligió por su enrutamiento simplificado (App Router), su optimización automática de imágenes y fuentes, y la facilidad para construir componentes modulares en React.</text:p>
      <text:p text:style-name="Preformatted_20_Text">- **Base de Datos y Backend (Supabase):** PostgreSQL brindó la robustez necesaria para manejar relaciones complejas (Usuarios &lt;-&gt; Figuritas &lt;-&gt; Amistades &lt;-&gt; Propuestas). La funcionalidad de *Realtime* de Supabase fue clave para que las colecciones y las alertas de trato se actualizaran al instante sin necesidad de recargar la página.</text:p>
      <text:p text:style-name="Preformatted_20_Text">- **Autenticación (Firebase Auth):** Se implementó autenticación por Email y Contraseña a través de Firebase por su simplicidad de integración y manejo seguro de sesiones en el lado del cliente.</text:p>
      <text:p text:style-name="Preformatted_20_Text">- **Testing (Playwright):** Se configuró Playwright para ejecutar pruebas End-to-End (E2E) exhaustivas que navegan por el flujo crítico (login, revisión de álbum, envío de propuestas).</text:p>
      <text:p text:style-name="Preformatted_20_Text">- **Estilos (Tailwind CSS):** Facilitó la creación de una interfaz altamente responsiva y moderna, utilizando utilidades de clases sin escribir CSS personalizado extenso.</text:p>
      <text:p text:style-name="Preformatted_20_Text"/>
      <text:p text:style-name="Preformatted_20_Text">## 4. Uso de Inteligencia Artificial como Copiloto</text:p>
      <text:p text:style-name="Preformatted_20_Text">Durante el desarrollo, la IA se utilizó de manera intensiva en las siguientes fases:</text:p>
      <text:p text:style-name="Preformatted_20_Text">- **Ideación y Estructuración:** Generación de la base de datos de figuritas (IDs, nombres, equipos) y estructuración de las tablas relacionales.</text:p>
      <text:p text:style-name="Preformatted_20_Text">- **Generación de Código:** Creación rápida de componentes visuales, modales y el esqueleto del layout general de la aplicación.</text:p>
      <text:p text:style-name="Preformatted_20_Text">- **Extracción e Identificación de Datos:** Se utilizó la IA para procesar recursos y extraer de forma automática las imágenes, logrando identificar y catalogar cada figurita del álbum.</text:p>
      <text:p text:style-name="Preformatted_20_Text">- **Procesamiento de Archivos y Base de Datos:** Se le solicitó a la IA analizar un único archivo `.xls` (padrón oficial) para extraer, estructurar y crear automáticamente las tablas relacionales de escuelas, localidades, departamentos y provincias.</text:p>
      <text:p text:style-name="Preformatted_20_Text">- **Resolución de Problemas (Debugging):** La IA fue vital para identificar y resolver errores de selectores "strict mode" en las pruebas de Playwright y corregir conflictos de tipos en TypeScript durante la integración del listener de Realtime de Supabase.</text:p>
      <text:p text:style-name="Preformatted_20_Text">- **Población de Datos:** Se le solicitó a la IA generar un script en Node.js para insertar aleatoriamente figuritas repetidas en perfiles *mockeados*, permitiendo probar masivamente el sistema de *matching* y propuestas.</text:p>
      <text:p text:style-name="Preformatted_20_Text"/>
      <text:p text:style-name="Preformatted_20_Text">## 5. Mejoras Futuras</text:p>
      <text:p text:style-name="Preformatted_20_Text">- **Escaneo con Cámara:** Integrar una API de Computer Vision (OCR) para que el usuario pueda apuntar su cámara a una figurita real y la aplicación la marque automáticamente en el inventario.</text:p>
      <text:p text:style-name="Preformatted_20_Text">- **Marketplace Público:** Extender la red de amistades privada hacia un mercado público con geolocalización, donde se pueda encontrar coleccionistas desconocidos cercanos para hacer tratos en zonas seguras.</text:p>
      <text:p text:style-name="Preformatted_20_Text">- **Chat Integrado:** Añadir un sistema de mensajería instantánea dentro del "Centro de Intercambios" para que los usuarios puedan negociar los detalles del encuentro físico sin depender de WhatsApp o redes sociales.</text:p>
      <text:p text:style-name="Preformatted_20_Text">- **Gamificación y Logros:** Incorporar un sistema de medallas (badges) y niveles para recompensar a los usuarios más solidarios, incentivando el intercambio continuo en la plataforma.</text:p>
      <text:p text:style-name="Preformatted_20_Text">- **Protección de Menores (Google Family Link):** Integración con la infraestructura de Google Family para permitir compartir datos reales de contacto de forma segura, exigiendo el consentimiento explícito y la supervisión directa de los padres o tutores legales antes de habilitar los canales de comunicació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Roboto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Roboto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Roboto" style:font-family-asian="Roboto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0" meta:image-count="0" meta:object-count="0" meta:page-count="1" meta:paragraph-count="31" meta:word-count="772" meta:character-count="5301" meta:non-whitespace-character-count="4559"/>
    <meta:generator>LibreOffice/25.8.5.1$Linux_X86_64 LibreOffice_project/580$Build-1</meta:generator>
  </office:meta>
</office:document-meta>
</file>